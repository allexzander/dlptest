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500" officeooo:paragraph-rsid="000e0500"/>
    </style:style>
    <style:style style:name="T1" style:family="text">
      <style:text-properties officeooo:rsid="000f8d6d"/>
    </style:style>
    <style:style style:name="T2" style:family="text">
      <style:text-properties officeooo:rsid="00108e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sad <text:span text:style-name="T1">5</text:span><text:span text:style-name="T2">rer</text:span><text:span text:style-name="T1"> sese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2:28:30.601084500</meta:creation-date>
    <dc:date>2026-07-09T18:53:47.185499700</dc:date>
    <meta:editing-duration>PT22S</meta:editing-duration>
    <meta:editing-cycles>4</meta:editing-cycles>
    <meta:generator>LibreOffice/26.2.1.2$Windows_X86_64 LibreOffice_project/62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