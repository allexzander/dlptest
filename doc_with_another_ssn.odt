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ead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333</text:span>-<text:span text:style-name="T1">12</text:span>-8<text:span text:style-name="T1">5</text:span>8<text:span text:style-name="T1">1</text:span> <text:span text:style-name="T1">662-23-6223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1T12:28:30.601084500</meta:creation-date>
    <dc:date>2026-04-28T13:23:30.205622300</dc:date>
    <meta:editing-duration>PT27S</meta:editing-duration>
    <meta:editing-cycles>2</meta:editing-cycles>
    <meta:generator>LibreOffice/26.2.1.2$Windows_X86_64 LibreOffice_project/620$Build-2</meta:generator>
    <meta:document-statistic meta:table-count="0" meta:image-count="0" meta:object-count="0" meta:page-count="1" meta:paragraph-count="1" meta:word-count="2" meta:character-count="23" meta:non-whitespace-character-count="22"/>
  </office:meta>
</office:document-meta>
</file>