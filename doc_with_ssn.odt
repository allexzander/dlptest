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1-55-8786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28:30.601084500</meta:creation-date>
    <dc:date>2026-03-11T12:28:33.9361066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1"/>
    <meta:generator>LibreOffice/26.2.1.2$Windows_X86_64 LibreOffice_project/620$Build-2</meta:generator>
  </office:meta>
</office:document-meta>
</file>